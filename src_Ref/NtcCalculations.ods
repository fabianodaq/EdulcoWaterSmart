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Res pull up</text:p>
          </table:table-cell>
          <table:table-cell office:value-type="string" calcext:value-type="string">
            <text:p>Voltage Pull up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3.5" calcext:value-type="float">
            <text:p>133.5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]*([.D2]/([.C2]+[.B2]))" office:value-type="float" office:value="2367.02127659575" calcext:value-type="float">
            <text:p>2367.0212765957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]*([.D3]/([.C3]+[.B3]))" office:value-type="float" office:value="2359.20463761151" calcext:value-type="float">
            <text:p>2359.2046376115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18.35" calcext:value-type="float">
            <text:p>118.35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]*([.D4]/([.C4]+[.B4]))" office:value-type="float" office:value="2351.01311084625" calcext:value-type="float">
            <text:p>2351.0131108462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1.498" calcext:value-type="float">
            <text:p>111.49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]*([.D5]/([.C5]+[.B5]))" office:value-type="float" office:value="2342.43432662734" calcext:value-type="float">
            <text:p>2342.4343266273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5.084" calcext:value-type="float">
            <text:p>105.08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]*([.D6]/([.C6]+[.B6]))" office:value-type="float" office:value="2333.45768492859" calcext:value-type="float">
            <text:p>2333.4576849285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9.0773" calcext:value-type="float">
            <text:p>99.077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]*([.D7]/([.C7]+[.B7]))" office:value-type="float" office:value="2324.07135478193" calcext:value-type="float">
            <text:p>2324.0713547819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93.4469" calcext:value-type="float">
            <text:p>93.446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]*([.D8]/([.C8]+[.B8]))" office:value-type="float" office:value="2314.2587835783" calcext:value-type="float">
            <text:p>2314.258783578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88.175" calcext:value-type="float">
            <text:p>88.175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]*([.D9]/([.C9]+[.B9]))" office:value-type="float" office:value="2304.0240397178" calcext:value-type="float">
            <text:p>2304.024039717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83.2296" calcext:value-type="float">
            <text:p>83.229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]*([.D10]/([.C10]+[.B10]))" office:value-type="float" office:value="2293.34197439424" calcext:value-type="float">
            <text:p>2293.3419743942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78.5909" calcext:value-type="float">
            <text:p>78.590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]*([.D11]/([.C11]+[.B11]))" office:value-type="float" office:value="2282.20694637877" calcext:value-type="float">
            <text:p>2282.2069463787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4.2384" calcext:value-type="float">
            <text:p>74.238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2]*([.D12]/([.C12]+[.B12]))" office:value-type="float" office:value="2270.60965225647" calcext:value-type="float">
            <text:p>2270.6096522564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3]*([.D13]/([.C13]+[.B13]))" office:value-type="float" office:value="2258.54026968798" calcext:value-type="float">
            <text:p>2258.5402696879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66.3162" calcext:value-type="float">
            <text:p>66.316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4]*([.D14]/([.C14]+[.B14]))" office:value-type="float" office:value="2245.99071748478" calcext:value-type="float">
            <text:p>2245.9907174847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2.7122" calcext:value-type="float">
            <text:p>62.712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5]*([.D15]/([.C15]+[.B15]))" office:value-type="float" office:value="2232.95239288899" calcext:value-type="float">
            <text:p>2232.9523928889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9.3254" calcext:value-type="float">
            <text:p>59.325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6]*([.D16]/([.C16]+[.B16]))" office:value-type="float" office:value="2219.41806558584" calcext:value-type="float">
            <text:p>2219.4180655858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6.1416" calcext:value-type="float">
            <text:p>56.141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7]*([.D17]/([.C17]+[.B17]))" office:value-type="float" office:value="2205.38138576026" calcext:value-type="float">
            <text:p>2205.3813857602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3.1475" calcext:value-type="float">
            <text:p>53.1475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8]*([.D18]/([.C18]+[.B18]))" office:value-type="float" office:value="2190.83639061792" calcext:value-type="float">
            <text:p>2190.8363906179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0.337" calcext:value-type="float">
            <text:p>50.33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9]*([.D19]/([.C19]+[.B19]))" office:value-type="float" office:value="2175.81306084341" calcext:value-type="float">
            <text:p>2175.8130608434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7.6799" calcext:value-type="float">
            <text:p>47.679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0]*([.D20]/([.C20]+[.B20]))" office:value-type="float" office:value="2160.20235629278" calcext:value-type="float">
            <text:p>2160.2023562927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5.1842" calcext:value-type="float">
            <text:p>45.184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1]*([.D21]/([.C21]+[.B21]))" office:value-type="float" office:value="2144.10582299817" calcext:value-type="float">
            <text:p>2144.1058229981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.8339" calcext:value-type="float">
            <text:p>42.833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2]*([.D22]/([.C22]+[.B22]))" office:value-type="float" office:value="2127.4876375564" calcext:value-type="float">
            <text:p>2127.487637556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.6197" calcext:value-type="float">
            <text:p>40.619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3]*([.D23]/([.C23]+[.B23]))" office:value-type="float" office:value="2110.34669792206" calcext:value-type="float">
            <text:p>2110.3466979220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8.533" calcext:value-type="float">
            <text:p>38.53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4]*([.D24]/([.C24]+[.B24]))" office:value-type="float" office:value="2092.68350965612" calcext:value-type="float">
            <text:p>2092.683509656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6.5656" calcext:value-type="float">
            <text:p>36.565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5]*([.D25]/([.C25]+[.B25]))" office:value-type="float" office:value="2074.49802113213" calcext:value-type="float">
            <text:p>2074.498021132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.7103" calcext:value-type="float">
            <text:p>34.710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6]*([.D26]/([.C26]+[.B26]))" office:value-type="float" office:value="2055.79562334312" calcext:value-type="float">
            <text:p>2055.79562334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7]*([.D27]/([.C27]+[.B27]))" office:value-type="float" office:value="2036.5793376174" calcext:value-type="float">
            <text:p>2036.5793376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3081" calcext:value-type="float">
            <text:p>31.308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8]*([.D28]/([.C28]+[.B28]))" office:value-type="float" office:value="2016.85344039002" calcext:value-type="float">
            <text:p>2016.85344039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7487" calcext:value-type="float">
            <text:p>29.748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29]*([.D29]/([.C29]+[.B29]))" office:value-type="float" office:value="1996.62672791265" calcext:value-type="float">
            <text:p>1996.626727912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276" calcext:value-type="float">
            <text:p>28.27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0]*([.D30]/([.C30]+[.B30]))" office:value-type="float" office:value="1975.90563506261" calcext:value-type="float">
            <text:p>1975.905635062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8848" calcext:value-type="float">
            <text:p>26.884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1]*([.D31]/([.C31]+[.B31]))" office:value-type="float" office:value="1954.70091435751" calcext:value-type="float">
            <text:p>1954.700914357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5702" calcext:value-type="float">
            <text:p>25.570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2]*([.D32]/([.C32]+[.B32]))" office:value-type="float" office:value="1933.02429377506" calcext:value-type="float">
            <text:p>1933.024293775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3274" calcext:value-type="float">
            <text:p>24.327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3]*([.D33]/([.C33]+[.B33]))" office:value-type="float" office:value="1910.88496075708" calcext:value-type="float">
            <text:p>1910.88496075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1523" calcext:value-type="float">
            <text:p>23.152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4]*([.D34]/([.C34]+[.B34]))" office:value-type="float" office:value="1888.30038855159" calcext:value-type="float">
            <text:p>1888.30038855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0407" calcext:value-type="float">
            <text:p>22.040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5]*([.D35]/([.C35]+[.B35]))" office:value-type="float" office:value="1865.28247468747" calcext:value-type="float">
            <text:p>1865.282474687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9889" calcext:value-type="float">
            <text:p>20.988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6]*([.D36]/([.C36]+[.B36]))" office:value-type="float" office:value="1841.84893063614" calcext:value-type="float">
            <text:p>1841.84893063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9934" calcext:value-type="float">
            <text:p>19.993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7]*([.D37]/([.C37]+[.B37]))" office:value-type="float" office:value="1818.01814253603" calcext:value-type="float">
            <text:p>1818.018142536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0509" calcext:value-type="float">
            <text:p>19.050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8]*([.D38]/([.C38]+[.B38]))" office:value-type="float" office:value="1793.80924940398" calcext:value-type="float">
            <text:p>1793.80924940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1582" calcext:value-type="float">
            <text:p>18.158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39]*([.D39]/([.C39]+[.B39]))" office:value-type="float" office:value="1769.23946340741" calcext:value-type="float">
            <text:p>1769.239463407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3124" calcext:value-type="float">
            <text:p>17.312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0]*([.D40]/([.C40]+[.B40]))" office:value-type="float" office:value="1744.32944817914" calcext:value-type="float">
            <text:p>1744.329448179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5109" calcext:value-type="float">
            <text:p>16.510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1]*([.D41]/([.C41]+[.B41]))" office:value-type="float" office:value="1719.10465663511" calcext:value-type="float">
            <text:p>1719.104656635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511" calcext:value-type="float">
            <text:p>15.751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2]*([.D42]/([.C42]+[.B42]))" office:value-type="float" office:value="1693.58653999166" calcext:value-type="float">
            <text:p>1693.586539991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0306" calcext:value-type="float">
            <text:p>15.030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3]*([.D43]/([.C43]+[.B43]))" office:value-type="float" office:value="1667.79846076003" calcext:value-type="float">
            <text:p>1667.798460760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3472" calcext:value-type="float">
            <text:p>14.347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4]*([.D44]/([.C44]+[.B44]))" office:value-type="float" office:value="1641.76645062067" calcext:value-type="float">
            <text:p>1641.766450620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6987" calcext:value-type="float">
            <text:p>13.698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5]*([.D45]/([.C45]+[.B45]))" office:value-type="float" office:value="1615.5118002519" calcext:value-type="float">
            <text:p>1615.51180025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0833" calcext:value-type="float">
            <text:p>13.083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6]*([.D46]/([.C46]+[.B46]))" office:value-type="float" office:value="1589.06735071636" calcext:value-type="float">
            <text:p>1589.067350716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499" calcext:value-type="float">
            <text:p>12.49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7]*([.D47]/([.C47]+[.B47]))" office:value-type="float" office:value="1562.45312265613" calcext:value-type="float">
            <text:p>1562.453122656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9441" calcext:value-type="float">
            <text:p>11.944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8]*([.D48]/([.C48]+[.B48]))" office:value-type="float" office:value="1535.69720377904" calcext:value-type="float">
            <text:p>1535.697203779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169" calcext:value-type="float">
            <text:p>11.416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49]*([.D49]/([.C49]+[.B49]))" office:value-type="float" office:value="1508.82279866151" calcext:value-type="float">
            <text:p>1508.822798661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9161" calcext:value-type="float">
            <text:p>10.916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0]*([.D50]/([.C50]+[.B50]))" office:value-type="float" office:value="1481.86912538485" calcext:value-type="float">
            <text:p>1481.869125384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44" calcext:value-type="float">
            <text:p>10.4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1]*([.D51]/([.C51]+[.B51]))" office:value-type="float" office:value="1454.84949832776" calcext:value-type="float">
            <text:p>1454.849498327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2]*([.D52]/([.C52]+[.B52]))" office:value-type="float" office:value="1428.57142857143" calcext:value-type="float">
            <text:p>1428.571428571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55693" calcext:value-type="float">
            <text:p>9.5569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3]*([.D53]/([.C53]+[.B53]))" office:value-type="float" office:value="1400.74005111119" calcext:value-type="float">
            <text:p>1400.740051111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14743" calcext:value-type="float">
            <text:p>9.1474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4]*([.D54]/([.C54]+[.B54]))" office:value-type="float" office:value="1373.70002456836" calcext:value-type="float">
            <text:p>1373.700024568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5777" calcext:value-type="float">
            <text:p>8.7577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5]*([.D55]/([.C55]+[.B55]))" office:value-type="float" office:value="1346.70529845114" calcext:value-type="float">
            <text:p>1346.705298451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869" calcext:value-type="float">
            <text:p>8.386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6]*([.D56]/([.C56]+[.B56]))" office:value-type="float" office:value="1319.78233639036" calcext:value-type="float">
            <text:p>1319.782336390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0338" calcext:value-type="float">
            <text:p>8.033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7]*([.D57]/([.C57]+[.B57]))" office:value-type="float" office:value="1292.9547180986" calcext:value-type="float">
            <text:p>1292.95471809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69753" calcext:value-type="float">
            <text:p>7.6975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8]*([.D58]/([.C58]+[.B58]))" office:value-type="float" office:value="1266.24688353963" calcext:value-type="float">
            <text:p>1266.246883539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37721" calcext:value-type="float">
            <text:p>7.3772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59]*([.D59]/([.C59]+[.B59]))" office:value-type="float" office:value="1239.68304540972" calcext:value-type="float">
            <text:p>1239.683045409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072" calcext:value-type="float">
            <text:p>7.07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0]*([.D60]/([.C60]+[.B60]))" office:value-type="float" office:value="1213.28575349986" calcext:value-type="float">
            <text:p>1213.285753499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7811" calcext:value-type="float">
            <text:p>6.781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1]*([.D61]/([.C61]+[.B61]))" office:value-type="float" office:value="1187.07592552394" calcext:value-type="float">
            <text:p>1187.075925523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50378" calcext:value-type="float">
            <text:p>6.5037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2]*([.D62]/([.C62]+[.B62]))" office:value-type="float" office:value="1161.07579524957" calcext:value-type="float">
            <text:p>1161.075795249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23934" calcext:value-type="float">
            <text:p>6.2393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3]*([.D63]/([.C63]+[.B63]))" office:value-type="float" office:value="1135.30562603444" calcext:value-type="float">
            <text:p>1135.30562603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98711" calcext:value-type="float">
            <text:p>5.9871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4]*([.D64]/([.C64]+[.B64]))" office:value-type="float" office:value="1109.78371200354" calcext:value-type="float">
            <text:p>1109.783712003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74646" calcext:value-type="float">
            <text:p>5.7464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5]*([.D65]/([.C65]+[.B65]))" office:value-type="float" office:value="1084.52748885363" calcext:value-type="float">
            <text:p>1084.527488853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5168" calcext:value-type="float">
            <text:p>5.516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6]*([.D66]/([.C66]+[.B66]))" office:value-type="float" office:value="1059.55380738738" calcext:value-type="float">
            <text:p>1059.553807387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29758" calcext:value-type="float">
            <text:p>5.2975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7]*([.D67]/([.C67]+[.B67]))" office:value-type="float" office:value="1034.87925060832" calcext:value-type="float">
            <text:p>1034.879250608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08828" calcext:value-type="float">
            <text:p>5.0882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8]*([.D68]/([.C68]+[.B68]))" office:value-type="float" office:value="1010.5193084361" calcext:value-type="float">
            <text:p>1010.51930843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88838" calcext:value-type="float">
            <text:p>4.8883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69]*([.D69]/([.C69]+[.B69]))" office:value-type="float" office:value="986.484915703264" calcext:value-type="float">
            <text:p>986.4849157032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69743" calcext:value-type="float">
            <text:p>4.6974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0]*([.D70]/([.C70]+[.B70]))" office:value-type="float" office:value="962.790932188174" calcext:value-type="float">
            <text:p>962.7909321881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1498" calcext:value-type="float">
            <text:p>4.5149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1]*([.D71]/([.C71]+[.B71]))" office:value-type="float" office:value="939.448088968937" calcext:value-type="float">
            <text:p>939.4480889689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3406" calcext:value-type="float">
            <text:p>4.340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2]*([.D72]/([.C72]+[.B72]))" office:value-type="float" office:value="916.465381821867" calcext:value-type="float">
            <text:p>916.4653818218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17391" calcext:value-type="float">
            <text:p>4.1739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3]*([.D73]/([.C73]+[.B73]))" office:value-type="float" office:value="893.854329868913" calcext:value-type="float">
            <text:p>893.8543298689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01452" calcext:value-type="float">
            <text:p>4.0145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4]*([.D74]/([.C74]+[.B74]))" office:value-type="float" office:value="871.621222595471" calcext:value-type="float">
            <text:p>871.6212225954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6207" calcext:value-type="float">
            <text:p>3.8620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5]*([.D75]/([.C75]+[.B75]))" office:value-type="float" office:value="849.7725326459" calcext:value-type="float">
            <text:p>849.77253264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71624" calcext:value-type="float">
            <text:p>3.7162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6]*([.D76]/([.C76]+[.B76]))" office:value-type="float" office:value="828.316797786068" calcext:value-type="float">
            <text:p>828.3167977860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88" calcext:value-type="float">
            <text:p>3.58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7]*([.D77]/([.C77]+[.B77]))" office:value-type="float" office:value="808.982683982684" calcext:value-type="float">
            <text:p>808.9826839826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4314" calcext:value-type="float">
            <text:p>3.4431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8]*([.D78]/([.C78]+[.B78]))" office:value-type="float" office:value="786.597813790192" calcext:value-type="float">
            <text:p>786.5978137901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31529" calcext:value-type="float">
            <text:p>3.3152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79]*([.D79]/([.C79]+[.B79]))" office:value-type="float" office:value="766.343297313341" calcext:value-type="float">
            <text:p>766.3432973133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19287" calcext:value-type="float">
            <text:p>3.1928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0]*([.D80]/([.C80]+[.B80]))" office:value-type="float" office:value="746.495094394676" calcext:value-type="float">
            <text:p>746.4950943946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07563" calcext:value-type="float">
            <text:p>3.0756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1]*([.D81]/([.C81]+[.B81]))" office:value-type="float" office:value="727.055976807055" calcext:value-type="float">
            <text:p>727.0559768070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96331" calcext:value-type="float">
            <text:p>2.9633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2]*([.D82]/([.C82]+[.B82]))" office:value-type="float" office:value="708.024038282341" calcext:value-type="float">
            <text:p>708.0240382823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5569" calcext:value-type="float">
            <text:p>2.8556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3]*([.D83]/([.C83]+[.B83]))" office:value-type="float" office:value="689.401189104734" calcext:value-type="float">
            <text:p>689.4011891047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75256" calcext:value-type="float">
            <text:p>2.7525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4]*([.D84]/([.C84]+[.B84]))" office:value-type="float" office:value="671.188464149442" calcext:value-type="float">
            <text:p>671.1884641494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65369" calcext:value-type="float">
            <text:p>2.6536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5]*([.D85]/([.C85]+[.B85]))" office:value-type="float" office:value="653.380692142462" calcext:value-type="float">
            <text:p>653.3806921424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5589" calcext:value-type="float">
            <text:p>2.558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6]*([.D86]/([.C86]+[.B86]))" office:value-type="float" office:value="635.979083199952" calcext:value-type="float">
            <text:p>635.9790831999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46799" calcext:value-type="float">
            <text:p>2.4679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7]*([.D87]/([.C87]+[.B87]))" office:value-type="float" office:value="618.978851303021" calcext:value-type="float">
            <text:p>618.9788513030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3808" calcext:value-type="float">
            <text:p>2.380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8]*([.D88]/([.C88]+[.B88]))" office:value-type="float" office:value="602.380374058781" calcext:value-type="float">
            <text:p>602.3803740587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29714" calcext:value-type="float">
            <text:p>2.2971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89]*([.D89]/([.C89]+[.B89]))" office:value-type="float" office:value="586.17616978016" calcext:value-type="float">
            <text:p>586.176169780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21686" calcext:value-type="float">
            <text:p>2.2168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0]*([.D90]/([.C90]+[.B90]))" office:value-type="float" office:value="570.364294638392" calcext:value-type="float">
            <text:p>570.3642946383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1398" calcext:value-type="float">
            <text:p>2.139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1]*([.D91]/([.C91]+[.B91]))" office:value-type="float" office:value="554.938899147285" calcext:value-type="float">
            <text:p>554.9388991472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06583" calcext:value-type="float">
            <text:p>2.0658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2]*([.D92]/([.C92]+[.B92]))" office:value-type="float" office:value="539.898262879437" calcext:value-type="float">
            <text:p>539.8982628794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9948" calcext:value-type="float">
            <text:p>1.994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3]*([.D93]/([.C93]+[.B93]))" office:value-type="float" office:value="525.234865400008" calcext:value-type="float">
            <text:p>525.2348654000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92658" calcext:value-type="float">
            <text:p>1.9265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4]*([.D94]/([.C94]+[.B94]))" office:value-type="float" office:value="510.94352352603" calcext:value-type="float">
            <text:p>510.943523526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86105" calcext:value-type="float">
            <text:p>1.86105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5]*([.D95]/([.C95]+[.B95]))" office:value-type="float" office:value="497.019565112888" calcext:value-type="float">
            <text:p>497.0195651128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79809" calcext:value-type="float">
            <text:p>1.7980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6]*([.D96]/([.C96]+[.B96]))" office:value-type="float" office:value="483.456817475417" calcext:value-type="float">
            <text:p>483.4568174754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73758" calcext:value-type="float">
            <text:p>1.7375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7]*([.D97]/([.C97]+[.B97]))" office:value-type="float" office:value="470.24761896514" calcext:value-type="float">
            <text:p>470.247618965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67942" calcext:value-type="float">
            <text:p>1.6794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8]*([.D98]/([.C98]+[.B98]))" office:value-type="float" office:value="457.387285906953" calcext:value-type="float">
            <text:p>457.3872859069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62351" calcext:value-type="float">
            <text:p>1.6235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99]*([.D99]/([.C99]+[.B99]))" office:value-type="float" office:value="444.869902044279" calcext:value-type="float">
            <text:p>444.8699020442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56975" calcext:value-type="float">
            <text:p>1.56975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0]*([.D100]/([.C100]+[.B100]))" office:value-type="float" office:value="432.688332092946" calcext:value-type="float">
            <text:p>432.6883320929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51804" calcext:value-type="float">
            <text:p>1.5180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1]*([.D101]/([.C101]+[.B101]))" office:value-type="float" office:value="420.834238925532" calcext:value-type="float">
            <text:p>420.8342389255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683" calcext:value-type="float">
            <text:p>1.468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2]*([.D102]/([.C102]+[.B102]))" office:value-type="float" office:value="409.30276641058" calcext:value-type="float">
            <text:p>409.302766410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2045" calcext:value-type="float">
            <text:p>1.42045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3]*([.D103]/([.C103]+[.B103]))" office:value-type="float" office:value="398.088100936612" calcext:value-type="float">
            <text:p>398.0881009366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7439" calcext:value-type="float">
            <text:p>1.3743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4]*([.D104]/([.C104]+[.B104]))" office:value-type="float" office:value="387.178724396832" calcext:value-type="float">
            <text:p>387.1787243968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3007" calcext:value-type="float">
            <text:p>1.3300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5]*([.D105]/([.C105]+[.B105]))" office:value-type="float" office:value="376.57402489448" calcext:value-type="float">
            <text:p>376.574024894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874" calcext:value-type="float">
            <text:p>1.287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6]*([.D106]/([.C106]+[.B106]))" office:value-type="float" office:value="366.263058470082" calcext:value-type="float">
            <text:p>366.2630584700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4632" calcext:value-type="float">
            <text:p>1.24632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7]*([.D107]/([.C107]+[.B107]))" office:value-type="float" office:value="356.241253464314" calcext:value-type="float">
            <text:p>356.2412534643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0675" calcext:value-type="float">
            <text:p>1.20675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8]*([.D108]/([.C108]+[.B108]))" office:value-type="float" office:value="346.498406408821" calcext:value-type="float">
            <text:p>346.4984064088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16864" calcext:value-type="float">
            <text:p>1.1686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09]*([.D109]/([.C109]+[.B109]))" office:value-type="float" office:value="337.030952952251" calcext:value-type="float">
            <text:p>337.0309529522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13193" calcext:value-type="float">
            <text:p>1.1319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0]*([.D110]/([.C110]+[.B110]))" office:value-type="float" office:value="327.832246090967" calcext:value-type="float">
            <text:p>327.8322460909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09655" calcext:value-type="float">
            <text:p>1.09655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1]*([.D111]/([.C111]+[.B111]))" office:value-type="float" office:value="318.89246267398" calcext:value-type="float">
            <text:p>318.892462673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6246" calcext:value-type="float">
            <text:p>1.0624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2]*([.D112]/([.C112]+[.B112]))" office:value-type="float" office:value="310.208748420431" calcext:value-type="float">
            <text:p>310.2087484204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296" calcext:value-type="float">
            <text:p>1.029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3]*([.D113]/([.C113]+[.B113]))" office:value-type="float" office:value="301.772650534609" calcext:value-type="float">
            <text:p>301.7726505346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97924" calcext:value-type="float">
            <text:p>0.99792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4]*([.D114]/([.C114]+[.B114]))" office:value-type="float" office:value="293.578761118598" calcext:value-type="float">
            <text:p>293.5787611185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67376" calcext:value-type="float">
            <text:p>0.96737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5]*([.D115]/([.C115]+[.B115]))" office:value-type="float" office:value="285.618590694449" calcext:value-type="float">
            <text:p>285.6185906944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37916" calcext:value-type="float">
            <text:p>0.937916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6]*([.D116]/([.C116]+[.B116]))" office:value-type="float" office:value="277.887336162152" calcext:value-type="float">
            <text:p>277.8873361621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09498" calcext:value-type="float">
            <text:p>0.909498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7]*([.D117]/([.C117]+[.B117]))" office:value-type="float" office:value="270.378208069019" calcext:value-type="float">
            <text:p>270.3782080690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82083" calcext:value-type="float">
            <text:p>0.88208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8]*([.D118]/([.C118]+[.B118]))" office:value-type="float" office:value="263.085858252656" calcext:value-type="float">
            <text:p>263.0858582526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5563" calcext:value-type="float">
            <text:p>0.85563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19]*([.D119]/([.C119]+[.B119]))" office:value-type="float" office:value="256.004035602342" calcext:value-type="float">
            <text:p>256.0040356023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30101" calcext:value-type="float">
            <text:p>0.83010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20]*([.D120]/([.C120]+[.B120]))" office:value-type="float" office:value="249.126931354134" calcext:value-type="float">
            <text:p>249.1269313541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05459" calcext:value-type="float">
            <text:p>0.80545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21]*([.D121]/([.C121]+[.B121]))" office:value-type="float" office:value="242.448671409973" calcext:value-type="float">
            <text:p>242.4486714099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8167" calcext:value-type="float">
            <text:p>0.7816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22]*([.D122]/([.C122]+[.B122]))" office:value-type="float" office:value="235.963881680869" calcext:value-type="float">
            <text:p>235.9638816808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58701" calcext:value-type="float">
            <text:p>0.758701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23]*([.D123]/([.C123]+[.B123]))" office:value-type="float" office:value="229.667171629049" calcext:value-type="float">
            <text:p>229.6671716290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36519" calcext:value-type="float">
            <text:p>0.736519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24]*([.D124]/([.C124]+[.B124]))" office:value-type="float" office:value="223.5528747035" calcext:value-type="float">
            <text:p>223.55287470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15094" calcext:value-type="float">
            <text:p>0.71509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25]*([.D125]/([.C125]+[.B125]))" office:value-type="float" office:value="217.615890944157" calcext:value-type="float">
            <text:p>217.6158909441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94397" calcext:value-type="float">
            <text:p>0.694397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26]*([.D126]/([.C126]+[.B126]))" office:value-type="float" office:value="211.851158785692" calcext:value-type="float">
            <text:p>211.8511587856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744" calcext:value-type="float">
            <text:p>0.674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 table:formula="of:=[.B127]*([.D127]/([.C127]+[.B127]))" office:value-type="float" office:value="206.253669994128" calcext:value-type="float">
            <text:p>206.253669994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3:30:34.051518500</meta:creation-date>
    <dc:date>2026-04-20T23:38:46.641375000</dc:date>
    <meta:editing-duration>PT8M13S</meta:editing-duration>
    <meta:editing-cycles>1</meta:editing-cycles>
    <meta:document-statistic meta:table-count="1" meta:cell-count="633" meta:object-count="0"/>
    <meta:generator>LibreOffice/25.8.5.2$Windows_X86_64 LibreOffice_project/9c8b85f387cc00a89945a79c9e6239f32e450ac2</meta:generator>
  </office:meta>
</office:document-meta>
</file>